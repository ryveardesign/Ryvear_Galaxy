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2cm" fo:min-width="5.602cm" loext:decorative="false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9" style:family="graphic" style:parent-style-name="standard">
      <style:graphic-properties draw:marker-start="Arrowheads_20_51" draw:marker-start-width="0.3cm" draw:marker-end="Arrowheads_20_52" draw:marker-end-width="0.3cm" draw:textarea-vertical-align="middle" loext:decorative="false"/>
    </style:style>
    <style:style style:name="gr20" style:family="graphic" style:parent-style-name="standard">
      <style:graphic-properties draw:marker-start="Arrowheads_20_53" draw:marker-start-width="0.3cm" draw:marker-end="Arrowheads_20_54" draw:marker-end-width="0.3cm" draw:textarea-vertical-align="middle" loext:decorative="false"/>
    </style:style>
    <style:style style:name="gr21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4cm" svg:x="7.35cm" svg:y="4.81cm">
          <text:p text:style-name="P1">Command and Control( Wifi, BLE, Commpor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15.287cm" svg:y="2.27cm">
          <text:p text:style-name="P1">User I/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25.13cm" svg:y="5.445cm">
          <text:p text:style-name="P1">User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2" draw:text-style-name="P2" draw:layer="layout" svg:x1="24.177cm" svg:y1="3.54cm" svg:x2="21.637cm" svg:y2="3.54cm">
          <text:p/>
        </draw:line>
        <draw:line draw:style-name="gr3" draw:text-style-name="P2" draw:layer="layout" svg:x1="10.207cm" svg:y1="3.54cm" svg:x2="15.287cm" svg:y2="3.54cm">
          <text:p/>
        </draw:line>
        <draw:custom-shape draw:style-name="gr1" draw:text-style-name="P1" draw:layer="layout" svg:width="6.35cm" svg:height="2.54cm" svg:x="7.032cm" svg:y="8.62cm">
          <text:p text:style-name="P1">Unit I/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4" draw:text-style-name="P2" draw:layer="layout" svg:x1="10.207cm" svg:y1="7.35cm" svg:x2="10.207cm" svg:y2="8.62cm">
          <text:p/>
        </draw:line>
        <draw:custom-shape draw:style-name="gr1" draw:text-style-name="P1" draw:layer="layout" svg:width="6.35cm" svg:height="2.54cm" svg:x="11.477cm" svg:y="18.78cm">
          <text:p text:style-name="P1">Ligh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11.477cm" svg:y="15.605cm">
          <text:p text:style-name="P1">Motion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2.587cm" svg:y="18.78cm">
          <text:p text:style-name="P1">Air Qu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2.587cm" svg:y="12.43cm">
          <text:p text:style-name="P1">Temper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2.587cm" svg:y="15.605cm">
          <text:p text:style-name="P1">Humid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11.477cm" svg:y="12.43cm">
          <text:p text:style-name="P1">Motor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2.587cm" svg:y="21.955cm">
          <text:p text:style-name="P1">Agricul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11.477cm" svg:y="21.955cm">
          <text:p text:style-name="P1">Animal Husband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5" draw:text-style-name="P2" draw:layer="layout" svg:x1="10.186cm" svg:y1="23.225cm" svg:x2="10.186cm" svg:y2="11.16cm">
          <text:p/>
        </draw:line>
        <draw:line draw:style-name="gr6" draw:text-style-name="P2" draw:layer="layout" svg:x1="10.207cm" svg:y1="13.7cm" svg:x2="8.937cm" svg:y2="13.7cm">
          <text:p/>
        </draw:line>
        <draw:line draw:style-name="gr7" draw:text-style-name="P2" draw:layer="layout" svg:x1="10.207cm" svg:y1="16.875cm" svg:x2="8.937cm" svg:y2="16.875cm">
          <text:p/>
        </draw:line>
        <draw:line draw:style-name="gr8" draw:text-style-name="P2" draw:layer="layout" svg:x1="10.207cm" svg:y1="20.05cm" svg:x2="8.937cm" svg:y2="20.05cm">
          <text:p/>
        </draw:line>
        <draw:line draw:style-name="gr9" draw:text-style-name="P2" draw:layer="layout" svg:x1="10.207cm" svg:y1="23.225cm" svg:x2="8.937cm" svg:y2="23.225cm">
          <text:p/>
        </draw:line>
        <draw:line draw:style-name="gr10" draw:text-style-name="P2" draw:layer="layout" svg:x1="10.207cm" svg:y1="23.225cm" svg:x2="11.477cm" svg:y2="23.225cm">
          <text:p/>
        </draw:line>
        <draw:line draw:style-name="gr11" draw:text-style-name="P2" draw:layer="layout" svg:x1="10.207cm" svg:y1="20.05cm" svg:x2="11.477cm" svg:y2="20.05cm">
          <text:p/>
        </draw:line>
        <draw:line draw:style-name="gr12" draw:text-style-name="P2" draw:layer="layout" svg:x1="10.207cm" svg:y1="16.875cm" svg:x2="11.477cm" svg:y2="16.875cm">
          <text:p/>
        </draw:line>
        <draw:line draw:style-name="gr13" draw:text-style-name="P2" draw:layer="layout" svg:x1="10.207cm" svg:y1="13.7cm" svg:x2="11.477cm" svg:y2="13.7cm">
          <text:p/>
        </draw:line>
        <draw:custom-shape draw:style-name="gr1" draw:text-style-name="P1" draw:layer="layout" svg:width="6.35cm" svg:height="2.54cm" svg:x="25.13cm" svg:y="12.43cm">
          <text:p text:style-name="P1">Local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14" draw:text-style-name="P2" draw:layer="layout" svg:x1="24.178cm" svg:y1="6.715cm" svg:x2="25.13cm" svg:y2="6.715cm">
          <text:p/>
        </draw:line>
        <draw:line draw:style-name="gr15" draw:text-style-name="P2" draw:layer="layout" svg:x1="24.178cm" svg:y1="13.7cm" svg:x2="25.13cm" svg:y2="13.7cm">
          <text:p/>
        </draw:line>
        <draw:line draw:style-name="gr16" draw:text-style-name="P2" draw:layer="layout" svg:x1="24.177cm" svg:y1="13.7cm" svg:x2="24.177cm" svg:y2="3.54cm">
          <text:p/>
        </draw:line>
        <draw:line draw:style-name="gr17" draw:text-style-name="P2" draw:layer="layout" svg:x1="10.207cm" svg:y1="3.54cm" svg:x2="10.207cm" svg:y2="4.81cm">
          <text:p/>
        </draw:line>
        <draw:custom-shape draw:style-name="gr1" draw:text-style-name="P1" draw:layer="layout" svg:width="6.35cm" svg:height="2.54cm" svg:x="32.75cm" svg:y="8.62cm">
          <text:p text:style-name="P1">Alarms Audible, Vis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32.75cm" svg:y="5.445cm">
          <text:p text:style-name="P1">Limits Min/M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32.75cm" svg:y="12.43cm">
          <text:p text:style-name="P1">Online Rep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32.75cm" svg:y="15.922cm">
          <text:p text:style-name="P1">Local Rep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18" draw:text-style-name="P2" draw:layer="layout" svg:x1="32.115cm" svg:y1="9.89cm" svg:x2="32.75cm" svg:y2="9.89cm">
          <text:p/>
        </draw:line>
        <draw:line draw:style-name="gr19" draw:text-style-name="P1" draw:layer="layout" svg:x1="31.48cm" svg:y1="6.715cm" svg:x2="32.75cm" svg:y2="6.715cm">
          <text:p/>
        </draw:line>
        <draw:line draw:style-name="gr20" draw:text-style-name="P1" draw:layer="layout" svg:x1="31.48cm" svg:y1="13.7cm" svg:x2="32.75cm" svg:y2="13.7cm">
          <text:p/>
        </draw:line>
        <draw:line draw:style-name="gr21" draw:text-style-name="P2" draw:layer="layout" svg:x1="32.115cm" svg:y1="17.192cm" svg:x2="32.75cm" svg:y2="17.192cm">
          <text:p/>
        </draw:line>
        <draw:line draw:style-name="gr16" draw:text-style-name="P2" draw:layer="layout" svg:x1="32.115cm" svg:y1="17.192cm" svg:x2="32.115cm" svg:y2="13.7cm">
          <text:p/>
        </draw:line>
        <draw:line draw:style-name="gr16" draw:text-style-name="P2" draw:layer="layout" svg:x1="32.115cm" svg:y1="9.89cm" svg:x2="32.11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2T16:02:30.928680700</meta:creation-date>
    <dc:date>2026-05-22T17:00:37.696371400</dc:date>
    <meta:editing-duration>PT4M23S</meta:editing-duration>
    <meta:editing-cycles>1</meta:editing-cycles>
    <meta:generator>LibreOffice/26.2.3.2$Windows_X86_64 LibreOffice_project/70e089b17412e4cb7773e41413306b17a2328c34</meta:generator>
    <meta:document-statistic meta:object-count="39"/>
  </office:meta>
</office:document-meta>
</file>